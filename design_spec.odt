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F000001E1998A5557.png" manifest:media-type="image/png"/>
  <manifest:file-entry manifest:full-path="Pictures/1000000100000714000002937A3E2533.png" manifest:media-type="image/png"/>
  <manifest:file-entry manifest:full-path="Pictures/10000001000002540000009D72619DA0.png" manifest:media-type="image/png"/>
  <manifest:file-entry manifest:full-path="Pictures/10000001000000EE00000241B31983C5.png" manifest:media-type="image/png"/>
  <manifest:file-entry manifest:full-path="Pictures/10000001000000F700000207AA9AD75D.png" manifest:media-type="image/png"/>
  <manifest:file-entry manifest:full-path="Pictures/10000000000003BB000001277B4BFDA5.jpg" manifest:media-type="image/jpeg"/>
  <manifest:file-entry manifest:full-path="Pictures/100000010000014E0000026E04F79C4C.png" manifest:media-type="image/png"/>
  <manifest:file-entry manifest:full-path="Pictures/100000010000013F000001D33993BD00.png" manifest:media-type="image/png"/>
  <manifest:file-entry manifest:full-path="Pictures/100000010000014C000001D8253EB8E3.png" manifest:media-type="image/png"/>
  <manifest:file-entry manifest:full-path="Pictures/1000000100000162000002203CE4B0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0">
      <style:paragraph-properties>
        <style:tab-stops>
          <style:tab-stop style:position="0.8165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0.8165in"/>
        </style:tab-stops>
      </style:paragraph-properties>
    </style:style>
    <style:style style:name="P4" style:family="paragraph" style:parent-style-name="Standard" style:list-style-name="WWNum1"/>
    <style:style style:name="P5" style:family="paragraph" style:parent-style-name="Standard" style:list-style-name="WWNum2"/>
    <style:style style:name="P6" style:family="paragraph" style:parent-style-name="Standard" style:list-style-name="WWNum3"/>
    <style:style style:name="P7" style:family="paragraph" style:parent-style-name="Standard" style:list-style-name="WWNum4"/>
    <style:style style:name="P8" style:family="paragraph" style:parent-style-name="Standard" style:list-style-name="WWNum5"/>
    <style:style style:name="P9" style:family="paragraph" style:parent-style-name="Standard" style:list-style-name="WWNum8"/>
    <style:style style:name="P10" style:family="paragraph" style:parent-style-name="Standard" style:list-style-name="WWNum9"/>
    <style:style style:name="P11" style:family="paragraph" style:parent-style-name="Standard">
      <style:paragraph-properties fo:margin-left="0.5in"/>
    </style:style>
    <style:style style:name="P12" style:family="paragraph">
      <loext:graphic-properties draw:fill="solid" draw:fill-color="#a0a0a0"/>
      <style:paragraph-properties fo:text-align="center"/>
    </style:style>
    <style:style style:name="P13"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font-name="Segoe UI Emoji" fo:font-weight="bold" style:font-weight-asian="bold" style:font-name-complex="Segoe UI Emoji1"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3335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none" loext:fill-use-slide-background="false" draw:textarea-vertical-align="top" draw:auto-grow-height="false" fo:min-height="0.2354in" fo:min-width="0.1366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Picture 1" text:anchor-type="as-char" svg:width="2.95in" svg:height="2.2in" draw:z-index="0"><draw:image xlink:href="Pictures/1000000100000162000002203CE4B05D.png" xlink:type="simple" xlink:show="embed" xlink:actuate="onLoad" draw:mime-type="image/png"/></draw:frame></text:p>
      <text:p text:style-name="Standard">I like the above writing most for the title:</text:p>
      <text:p text:style-name="Standard">“Restore</text:p>
      <text:p text:style-name="Standard">Specialist Pelvic Health Physiotherapy “</text:p>
      <text:p text:style-name="Standard"/>
      <text:p text:style-name="Standard"/>
      <text:p text:style-name="Standard"><draw:frame draw:style-name="fr1" draw:name="Image2" text:anchor-type="as-char" svg:width="2.7665in" svg:height="3.9339in" draw:z-index="1"><draw:image xlink:href="Pictures/100000010000014C000001D8253EB8E3.png" xlink:type="simple" xlink:show="embed" xlink:actuate="onLoad" draw:mime-type="image/png"/></draw:frame></text:p>
      <text:p text:style-name="Standard"><text:soft-page-break/><draw:frame draw:style-name="fr1" draw:name="Image3" text:anchor-type="as-char" svg:width="2.6583in" svg:height="3.8925in" draw:z-index="2"><draw:image xlink:href="Pictures/100000010000013F000001D33993BD00.png" xlink:type="simple" xlink:show="embed" xlink:actuate="onLoad" draw:mime-type="image/png"/></draw:frame></text:p>
      <text:p text:style-name="Standard"><draw:frame draw:style-name="fr1" draw:name="Image4" text:anchor-type="as-char" svg:width="2.7835in" svg:height="5.1839in" draw:z-index="3"><draw:image xlink:href="Pictures/100000010000014E0000026E04F79C4C.png" xlink:type="simple" xlink:show="embed" xlink:actuate="onLoad" draw:mime-type="image/png"/></draw:frame></text:p>
      <text:p text:style-name="Standard"><text:soft-page-break/><draw:frame draw:style-name="fr1" draw:name="Image5" text:anchor-type="as-char" svg:width="2.0583in" svg:height="4.3252in" draw:z-index="4"><draw:image xlink:href="Pictures/10000001000000F700000207AA9AD75D.png" xlink:type="simple" xlink:show="embed" xlink:actuate="onLoad" draw:mime-type="image/png"/></draw:frame></text:p>
      <text:p text:style-name="Standard"><draw:frame draw:style-name="fr1" draw:name="Image6" text:anchor-type="as-char" svg:width="1.9835in" svg:height="4.8083in" draw:z-index="5"><draw:image xlink:href="Pictures/10000001000000EE00000241B31983C5.png" xlink:type="simple" xlink:show="embed" xlink:actuate="onLoad" draw:mime-type="image/png"/></draw:frame></text:p>
      <text:p text:style-name="Standard"/>
      <text:p text:style-name="Standard"><text:soft-page-break/>Neutral minimalistic vibes </text:p>
      <text:p text:style-name="Standard"/>
      <text:p text:style-name="Standard"/>
      <text:p text:style-name="Standard">Can the below be added in somewhere to basically say I am HCPC and CSP registered:</text:p>
      <text:p text:style-name="Standard"><draw:frame draw:style-name="fr1" draw:name="Image7" text:anchor-type="as-char" svg:width="6.2681in" svg:height="2.2791in" draw:z-index="6"><draw:image xlink:href="Pictures/1000000100000714000002937A3E2533.png" xlink:type="simple" xlink:show="embed" xlink:actuate="onLoad" draw:mime-type="image/png"/></draw:frame></text:p>
      <text:p text:style-name="Standard">The logos for HCPC and CSP are:</text:p>
      <text:p text:style-name="Standard"><draw:frame draw:style-name="fr1" draw:name="Image8" text:anchor-type="as-char" svg:width="6.2681in" svg:height="1.9366in" draw:z-index="7"><draw:image xlink:href="Pictures/10000000000003BB000001277B4BFDA5.jpg" xlink:type="simple" xlink:show="embed" xlink:actuate="onLoad" draw:mime-type="image/jpeg"/><svg:desc>Diagnostic Radiographer (Integrated Degree) - Canterbury Christ Church ...</svg:desc></draw:frame></text:p>
      <text:p text:style-name="Standard"><draw:custom-shape text:anchor-type="as-char" draw:z-index="8" draw:name="Rectangle 2" draw:style-name="gr2" draw:text-style-name="P13" svg:width="0.3335in" svg:height="0.3335in"><svg:desc>Using the CSP brand | The Chartered Society of Physiotherapy</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custom-shape text:anchor-type="as-char" draw:z-index="9" draw:name="Rectangle 3" draw:style-name="gr2" draw:text-style-name="P13" svg:width="0.3335in" svg:height="0.3335in"><svg:desc>Using the CSP brand | The Chartered Society of Physiotherapy</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custom-shape text:anchor-type="as-char" draw:z-index="10" draw:name="Rectangle 4" draw:style-name="gr2" draw:text-style-name="P13" svg:width="0.3335in" svg:height="0.3335in"><svg:desc>CSP logo | The Chartered Society of Physiotherapy</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frame draw:style-name="fr1" draw:name="Image9" text:anchor-type="as-char" svg:width="4.9665in" svg:height="1.3083in" draw:z-index="11"><draw:image xlink:href="Pictures/10000001000002540000009D72619DA0.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p>
      <text:p text:style-name="Standard" loext:marker-style-name="T1"><text:span text:style-name="T1">What do we offer? Female only clinic</text:span><text:span text:style-name="T1"/></text:p>
      <text:p text:style-name="P3">Urinary incontinence </text:p>
      <text:p text:style-name="P3">Urine frequency &amp; urgency</text:p>
      <text:p text:style-name="P3">Pelvic organ prolapse </text:p>
      <text:p text:style-name="P3">Pelvic pain</text:p>
      <text:p text:style-name="P3">Pregnancy related pelvic girdle pain (PGP)</text:p>
      <text:p text:style-name="P3">Dyspareunia (pain with intercourse)</text:p>
      <text:p text:style-name="P3">Pelvic floor dysfunction (weakness/tightness)</text:p>
      <text:p text:style-name="P3">Diastasis Recti (separation of abdominal muscle wall)</text:p>
      <text:p text:style-name="P3">Postnatal recovery </text:p>
      <text:p text:style-name="P3">Pelvic floor MOT (no symptoms) </text:p>
      <text:p text:style-name="P3"/>
      <text:p text:style-name="P3"/>
      <text:p text:style-name="P3" loext:marker-style-name="T1"><text:span text:style-name="T1">What is a pelvic floor MOT assessment?</text:span><text:span text:style-name="T1"/></text:p>
      <text:p text:style-name="P3">Ever wonder if everything is functioning as it should be? Want to learn more about how your pelvis works? </text:p>
      <text:p text:style-name="P3">This is a one-off specialist session designed for women who don’t currently experience symptoms but want to take a proactive approach to their pelvic health.</text:p>
      <text:p text:style-name="P3">Many pelvic health issues develop over a long period of time, and can be prevented. A pelvic floor MOT allows you to understand how your pelvic floor is functioning now, and what you can do to maintain long term health, as well as prevent future problems. </text:p>
      <text:p text:style-name="P3">What this session includes: </text:p>
      <text:list text:style-name="WWNum10">
        <text:list-item>
          <text:p text:style-name="P1">Internal vaginal examination to assess your pelvic floor</text:p>
        </text:list-item>
        <text:list-item>
          <text:p text:style-name="P1">Identifying any early signs of weakness, tension or dysfunction</text:p>
        </text:list-item>
        <text:list-item>
          <text:p text:style-name="P1">Core strength assessment </text:p>
        </text:list-item>
        <text:list-item>
          <text:p text:style-name="P1">Personalised advice/treatment plans tailored to your lifestyle</text:p>
        </text:list-item>
      </text:list>
      <text:p text:style-name="P3">Most women only need a single session, with no ongoing treatment required.</text:p>
      <text:p text:style-name="P3"/>
      <text:p text:style-name="P3"/>
      <text:p text:style-name="Standard"/>
      <text:p text:style-name="Standard"><text:soft-page-break/></text:p>
      <text:p text:style-name="Standard"/>
      <text:p text:style-name="Standard"/>
      <text:p text:style-name="Standard" loext:marker-style-name="T1"><text:span text:style-name="T1">Fees:</text:span><text:span text:style-name="T1"/></text:p>
      <text:p text:style-name="Standard">Initial assessment (1 hour 30 minutes) £90</text:p>
      <text:p text:style-name="Standard">Initial assessment pelvic floor MOT only (1 hour) <text:s/>£80</text:p>
      <text:p text:style-name="Standard">Follow up (30 minutes) £60</text:p>
      <text:p text:style-name="Standard">Extended follow up (45 minutes) £75</text:p>
      <text:p text:style-name="Standard"/>
      <text:p text:style-name="Standard"/>
      <text:p text:style-name="P2" loext:marker-style-name="T1"/>
      <text:p text:style-name="P3" loext:marker-style-name="T1"><text:span text:style-name="T1">How to book? </text:span><text:span text:style-name="T1"/></text:p>
      <text:p text:style-name="P3">Booking system as you sent me on message but the box where it says “fave species of bat” can you change to “What is the main reason you are coming to physiotherapy? “</text:p>
      <text:p text:style-name="P3">Then a drop down list:</text:p>
      <text:p text:style-name="P3">Urinary incontinence </text:p>
      <text:p text:style-name="P3">Urine frequency &amp; urgency</text:p>
      <text:p text:style-name="P3">Pelvic organ prolapse </text:p>
      <text:p text:style-name="P3">Pelvic pain</text:p>
      <text:p text:style-name="P3">Pregnancy related pelvic girdle pain (PGP)</text:p>
      <text:p text:style-name="P3">Dyspareunia (pain with intercourse)</text:p>
      <text:p text:style-name="P3">Pelvic floor dysfunction (weakness/tightness)</text:p>
      <text:p text:style-name="P3">Diastasis Recti (separation of abdominal muscle wall)</text:p>
      <text:p text:style-name="P3">Mixed symptoms </text:p>
      <text:p text:style-name="P3">Other (space for them to make a comment)</text:p>
      <text:p text:style-name="P3"/>
      <text:p text:style-name="P3" loext:marker-style-name="T1"><text:span text:style-name="T1">Only day I want available is Wednesday (0930-17:00)</text:span><text:span text:style-name="T1"/></text:p>
      <text:p text:style-name="Standard"/>
      <text:p text:style-name="Standard"/>
      <text:p text:style-name="Standard"><text:soft-page-break/></text:p>
      <text:p text:style-name="Standard"/>
      <text:p text:style-name="Standard"/>
      <text:p text:style-name="Standard"/>
      <text:p text:style-name="Standard"/>
      <text:p text:style-name="Standard"/>
      <text:p text:style-name="Standard">Can the below be put on so that when they book in they have to sign this? And where will this then go to?<draw:rect text:anchor-type="as-char" style:rel-width="100%" draw:z-index="13" draw:style-name="gr1" draw:text-style-name="P12" svg:width="6.2685in" svg:height="0.0213in"><text:p/></draw:rect></text:p>
      <text:p text:style-name="Standard" loext:marker-style-name="T1"><text:span text:style-name="T1">Restore</text:span><text:span text:style-name="T1"/></text:p>
      <text:p text:style-name="Standard"><text:span text:style-name="T1">Pelvic Health Physiotherapy – Privacy &amp; Consent Form</text:span></text:p>
      <text:p text:style-name="Standard"><draw:rect text:anchor-type="as-char" style:rel-width="100%" draw:z-index="14" draw:style-name="gr1" draw:text-style-name="P12" svg:width="6.2685in" svg:height="0.0213in"><text:p/></draw:rect></text:p>
      <text:p text:style-name="Standard" loext:marker-style-name="T1"><text:span text:style-name="T2">🔹</text:span><text:span text:style-name="T1"> Your Privacy Matters</text:span></text:p>
      <text:p text:style-name="Standard">We respect your privacy. Your personal and sensitive health information (including pelvic health details, medical history, and treatment notes) is collected and stored securely to provide safe, effective physiotherapy.</text:p>
      <text:p text:style-name="Standard"><text:span text:style-name="T1">Why we collect your information:</text:span></text:p>
      <text:list text:style-name="WWNum1">
        <text:list-item>
          <text:p text:style-name="P4">Provide personalised pelvic health assessment and treatment </text:p>
        </text:list-item>
        <text:list-item>
          <text:p text:style-name="P4">Manage appointments and communicate with you </text:p>
        </text:list-item>
        <text:list-item>
          <text:p text:style-name="P4">Maintain accurate and secure clinical records </text:p>
        </text:list-item>
      </text:list>
      <text:p text:style-name="Standard"><text:span text:style-name="T1">How we protect your information:</text:span></text:p>
      <text:list text:style-name="WWNum2">
        <text:list-item>
          <text:p text:style-name="P5">Records are securely stored electronically and/or on paper </text:p>
        </text:list-item>
        <text:list-item>
          <text:p text:style-name="P5">Only your physiotherapist has access to your information </text:p>
        </text:list-item>
        <text:list-item>
          <text:p text:style-name="P5">Data will not be shared without your consent, except when legally required or necessary for your care </text:p>
        </text:list-item>
      </text:list>
      <text:p text:style-name="Standard"><text:span text:style-name="T1">Your rights:</text:span></text:p>
      <text:list text:style-name="WWNum3">
        <text:list-item>
          <text:p text:style-name="P6">Access your records and request corrections </text:p>
        </text:list-item>
        <text:list-item>
          <text:p text:style-name="P6">Withdraw consent or request deletion (where legally allowed) </text:p>
        </text:list-item>
        <text:list-item>
          <text:p text:style-name="P6">Ask questions about how your data is used </text:p>
        </text:list-item>
      </text:list>
      <text:p text:style-name="Standard"><draw:rect text:anchor-type="as-char" style:rel-width="100%" draw:z-index="15" draw:style-name="gr1" draw:text-style-name="P12" svg:width="6.2685in" svg:height="0.0213in"><text:p/></draw:rect></text:p>
      <text:p text:style-name="Standard" loext:marker-style-name="T1"><text:soft-page-break/><text:span text:style-name="T2">🔹</text:span><text:span text:style-name="T1"> Consent to Treatment &amp; Data Use</text:span></text:p>
      <text:p text:style-name="Standard"><text:span text:style-name="T1">Client Name:</text:span> __________________________</text:p>
      <text:p text:style-name="Standard"><text:span text:style-name="T1">Date of Birth:</text:span> _________________________</text:p>
      <text:p text:style-name="Standard">I understand that Restore will collect and store sensitive personal and health information relevant to pelvic health physiotherapy.</text:p>
      <text:p text:style-name="Standard"><text:span text:style-name="T1">I consent to:</text:span></text:p>
      <text:list text:style-name="WWNum4">
        <text:list-item>
          <text:p text:style-name="P7">Pelvic health assessment and treatment (including internal assessment if required) </text:p>
        </text:list-item>
        <text:list-item>
          <text:p text:style-name="P7">Collection, storage, and use of sensitive health information for my care </text:p>
        </text:list-item>
        <text:list-item>
          <text:p text:style-name="P7">Use of my information for appointment management, clinical records, and follow-up </text:p>
        </text:list-item>
      </text:list>
      <text:p text:style-name="Standard"><text:span text:style-name="T1">I understand that:</text:span></text:p>
      <text:list text:style-name="WWNum5">
        <text:list-item>
          <text:p text:style-name="P8">My information will be kept confidential and stored securely </text:p>
        </text:list-item>
        <text:list-item>
          <text:p text:style-name="P8">It will not be shared without my consent unless legally required or necessary for my care </text:p>
        </text:list-item>
        <text:list-item>
          <text:p text:style-name="P8">I can request access to my records or withdraw consent at any time </text:p>
        </text:list-item>
        <text:list-item>
          <text:p text:style-name="P8">Consent can be withdrawn at any point</text:p>
        </text:list-item>
      </text:list>
      <text:p text:style-name="Standard"><text:span text:style-name="T1">Client Signature:</text:span> __________________________</text:p>
      <text:p text:style-name="Standard"><text:span text:style-name="T1">Date:</text:span> ______________________________</text:p>
      <text:p text:style-name="Standard"><draw:rect text:anchor-type="as-char" style:rel-width="100%" draw:z-index="16" draw:style-name="gr1" draw:text-style-name="P12" svg:width="6.2685in" svg:height="0.0213i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an the below be put in somewhere as the cancellation policy:</text:p>
      <text:p text:style-name="Standard" loext:marker-style-name="T1"><text:span text:style-name="T1">Restore – Appointment &amp; Cancellation Policy</text:span><text:span text:style-name="T1"/></text:p>
      <text:list text:style-name="WWNum8">
        <text:list-item>
          <text:p text:style-name="P9">Please give at least <text:span text:style-name="T1">24 hours’ notice</text:span> if you need to cancel or reschedule. </text:p>
        </text:list-item>
        <text:list-item>
          <text:p text:style-name="P9"><text:span text:style-name="T1">Late cancellations</text:span> (less than 24 hours) or <text:span text:style-name="T1">no-shows</text:span> will incur a fee for the full session cost. </text:p>
        </text:list-item>
        <text:list-item>
          <text:p text:style-name="P9">Emergencies or sudden illness are exceptions—please let us know as soon as possible. </text:p>
        </text:list-item>
      </text:list>
      <text:p text:style-name="Standard"><text:span text:style-name="T1">To cancel or reschedule:</text:span></text:p>
      <text:list text:style-name="WWNum9">
        <text:list-item>
          <text:p text:style-name="P10">Phone: 07429564579 </text:p>
        </text:list-item>
        <text:list-item>
          <text:p text:style-name="P10">Email: restore.physio26@gmail.com </text:p>
        </text:list-item>
      </text:list>
      <text:p text:style-name="P11"/>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loext:marker-style-name="T1"><text:span text:style-name="T1">Something like this at the end </text:span><text:span text:style-name="T1"/></text:p>
      <text:p text:style-name="Standard"/>
      <text:p text:style-name="Standard"><text:soft-page-break/><draw:frame draw:style-name="fr1" draw:name="Image10" text:anchor-type="as-char" svg:width="6.2681in" svg:height="3.5598in" draw:z-index="12"><draw:image xlink:href="Pictures/100000010000034F000001E1998A5557.png" xlink:type="simple" xlink:show="embed" xlink:actuate="onLoad" draw:mime-type="image/png"/></draw:frame></text:p>
      <text:p text:style-name="Standard"/>
      <text:p text:style-name="Standard"/>
      <text:p text:style-name="Standard" loext:marker-style-name="T1"><text:span text:style-name="T1">Location: </text:span><text:span text:style-name="T1"/></text:p>
      <text:p text:style-name="Standard">The Healthcare Hub</text:p>
      <text:p text:style-name="Standard">63 Taff Street</text:p>
      <text:p text:style-name="Standard">Pontypridd</text:p>
      <text:p text:style-name="Standard">CF37 4TD</text:p>
      <text:p text:style-name="Standard">W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3"><text:tab/></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lly Watts</meta:initial-creator>
    <dc:creator>Milly Watts</dc:creator>
    <meta:editing-cycles>1</meta:editing-cycles>
    <meta:creation-date>2026-04-25T09:14:00</meta:creation-date>
    <dc:date>2026-04-25T11:26:00</dc:date>
    <meta:editing-duration>PT2H12M</meta:editing-duration>
    <meta:generator>LibreOffice/24.2.7.2$Linux_X86_64 LibreOffice_project/420$Build-2</meta:generator>
    <meta:document-statistic meta:table-count="0" meta:image-count="10" meta:object-count="0" meta:page-count="12" meta:paragraph-count="107" meta:word-count="728" meta:character-count="4565" meta:non-whitespace-character-count="3914"/>
    <meta:user-defined meta:name="AppVersion">16.0000</meta:user-defined>
    <meta:template xlink:type="simple" xlink:actuate="onRequest" xlink:title="Normal" xlink:href=""/>
  </office:meta>
</office:document-meta>
</file>